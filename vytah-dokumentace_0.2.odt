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1000003B832F53A72F78E466B.png" manifest:media-type="image/png"/>
  <manifest:file-entry manifest:full-path="Pictures/10000001000001260000029E5657BAAEC694E06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17.013cm" style:type="right"/>
        </style:tab-stops>
      </style:paragraph-properties>
      <style:text-properties style:font-name="Noto Mono" officeooo:rsid="000dfcad" officeooo:paragraph-rsid="000dc81b"/>
    </style:style>
    <style:style style:name="P2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17.013cm" style:type="right"/>
        </style:tab-stops>
      </style:paragraph-properties>
      <style:text-properties style:font-name="Noto Mono" fo:font-size="12pt" fo:font-weight="bold" officeooo:rsid="000dc81b" officeooo:paragraph-rsid="000dc81b" style:font-size-asian="12pt" style:font-weight-asian="bold" style:font-size-complex="12pt" style:font-weight-complex="bold"/>
    </style:style>
    <style:style style:name="P3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size="12pt" fo:font-weight="normal" officeooo:rsid="000dc81b" officeooo:paragraph-rsid="000dc81b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size="20pt" fo:font-weight="bold" officeooo:rsid="000dc81b" officeooo:paragraph-rsid="003f1bec" style:font-size-asian="20pt" style:font-weight-asian="bold" style:font-size-complex="20pt" style:font-weight-complex="bold"/>
    </style:style>
    <style:style style:name="P5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size="20pt" fo:font-weight="bold" officeooo:rsid="000dc81b" officeooo:paragraph-rsid="000dc81b" style:font-size-asian="20pt" style:font-weight-asian="bold" style:font-size-complex="20pt" style:font-weight-complex="bold"/>
    </style:style>
    <style:style style:name="P6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129013" officeooo:paragraph-rsid="003f1bec" style:font-weight-asian="normal" style:font-weight-complex="normal"/>
    </style:style>
    <style:style style:name="P7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129013" officeooo:paragraph-rsid="00129013" style:font-weight-asian="normal" style:font-weight-complex="normal"/>
    </style:style>
    <style:style style:name="P8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0dc81b" officeooo:paragraph-rsid="000dc81b" style:font-weight-asian="normal" style:font-weight-complex="normal"/>
    </style:style>
    <style:style style:name="P9" style:family="paragraph" style:parent-style-name="Standard">
      <loext:graphic-properties draw:fill="none"/>
      <style:paragraph-properties fo:line-height="100%" fo:break-before="page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0dc81b" officeooo:paragraph-rsid="000dc81b" style:font-weight-asian="normal" style:font-weight-complex="normal"/>
    </style:style>
    <style:style style:name="P10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38729d" officeooo:paragraph-rsid="0038729d" style:font-weight-asian="normal" style:font-weight-complex="normal"/>
    </style:style>
    <style:style style:name="P11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424517" officeooo:paragraph-rsid="00424517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116920" officeooo:paragraph-rsid="0034f8ed" style:font-weight-asian="normal" style:font-weight-complex="normal"/>
    </style:style>
    <style:style style:name="P13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116920" officeooo:paragraph-rsid="00138a86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116920" officeooo:paragraph-rsid="00116920" style:font-weight-asian="normal" style:font-weight-complex="normal"/>
    </style:style>
    <style:style style:name="P15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116920" officeooo:paragraph-rsid="00116920" style:font-weight-asian="normal" style:font-weight-complex="normal"/>
    </style:style>
    <style:style style:name="P16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34f8ed" officeooo:paragraph-rsid="0034f8ed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18ddd3" officeooo:paragraph-rsid="0048cdb9" style:font-weight-asian="normal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7.013cm" style:type="right"/>
        </style:tab-stops>
      </style:paragraph-properties>
      <style:text-properties style:font-name="Noto Mono" fo:font-weight="normal" officeooo:rsid="0018ddd3" officeooo:paragraph-rsid="0018ddd3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18ddd3" officeooo:paragraph-rsid="0018ddd3" style:font-weight-asian="normal" style:font-weight-complex="normal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7.013cm" style:type="right"/>
        </style:tab-stops>
      </style:paragraph-properties>
      <style:text-properties style:font-name="Noto Mono" fo:font-weight="normal" officeooo:rsid="0018ddd3" officeooo:paragraph-rsid="0034f8ed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18ddd3" officeooo:paragraph-rsid="0030696d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18ddd3" officeooo:paragraph-rsid="002856ef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18ddd3" officeooo:paragraph-rsid="0030784d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18ddd3" officeooo:paragraph-rsid="003fc574" style:font-weight-asian="normal" style:font-weight-complex="normal"/>
    </style:style>
    <style:style style:name="P25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441521" officeooo:paragraph-rsid="00441521" style:font-weight-asian="normal" style:font-weight-complex="normal"/>
    </style:style>
    <style:style style:name="P26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4723a7" officeooo:paragraph-rsid="004723a7" style:font-weight-asian="normal" style:font-weight-complex="normal"/>
    </style:style>
    <style:style style:name="P27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4723a7" officeooo:paragraph-rsid="004cc390" style:font-weight-asian="normal" style:font-weight-complex="normal"/>
    </style:style>
    <style:style style:name="P28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581a50" officeooo:paragraph-rsid="00581a50" style:font-weight-asian="normal" style:font-weight-complex="normal"/>
    </style:style>
    <style:style style:name="P29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4c1b19" officeooo:paragraph-rsid="004c1b19" style:font-weight-asian="normal" style:font-weight-complex="normal"/>
    </style:style>
    <style:style style:name="P30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212cb9" officeooo:paragraph-rsid="00374fef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263eab" officeooo:paragraph-rsid="00263eab" style:font-weight-asian="normal" style:font-weight-complex="normal"/>
    </style:style>
    <style:style style:name="P32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263eab" officeooo:paragraph-rsid="002c4abb" style:font-weight-asian="normal" style:font-weight-complex="normal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7.013cm" style:type="right"/>
        </style:tab-stops>
      </style:paragraph-properties>
      <style:text-properties style:font-name="Noto Mono" fo:font-weight="normal" officeooo:rsid="00317f9b" officeooo:paragraph-rsid="0030784d" style:font-weight-asian="normal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7.013cm" style:type="right"/>
        </style:tab-stops>
      </style:paragraph-properties>
      <style:text-properties style:font-name="Noto Mono" fo:font-weight="normal" officeooo:rsid="00317f9b" officeooo:paragraph-rsid="003fc574" style:font-weight-asian="normal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7.013cm" style:type="right"/>
        </style:tab-stops>
      </style:paragraph-properties>
      <style:text-properties style:font-name="Noto Mono" fo:font-weight="normal" officeooo:rsid="002ef9ab" officeooo:paragraph-rsid="0030696d" style:font-weight-asian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7.013cm" style:type="right"/>
        </style:tab-stops>
      </style:paragraph-properties>
      <style:text-properties style:font-name="Noto Mono" fo:font-weight="normal" officeooo:rsid="0033bd68" officeooo:paragraph-rsid="0033bd68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17.013cm" style:type="right"/>
        </style:tab-stops>
      </style:paragraph-properties>
      <style:text-properties style:font-name="Noto Mono" fo:font-weight="bold" officeooo:rsid="00116920" officeooo:paragraph-rsid="00598448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17.013cm" style:type="right"/>
        </style:tab-stops>
      </style:paragraph-properties>
      <style:text-properties style:font-name="Noto Mono" fo:font-weight="bold" officeooo:rsid="00116920" officeooo:paragraph-rsid="003bdba2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17.013cm" style:type="right"/>
        </style:tab-stops>
      </style:paragraph-properties>
      <style:text-properties style:font-name="Noto Mono" fo:font-weight="bold" officeooo:rsid="00116920" officeooo:paragraph-rsid="004723a7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17.013cm" style:type="right"/>
        </style:tab-stops>
      </style:paragraph-properties>
      <style:text-properties style:font-name="Noto Mono" fo:font-weight="bold" officeooo:rsid="00116920" officeooo:paragraph-rsid="00116920" style:font-weight-asian="bold" style:font-weight-complex="bold"/>
    </style:style>
    <style:style style:name="P41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bold" officeooo:rsid="004cc390" officeooo:paragraph-rsid="004cc390" style:font-weight-asian="bold" style:font-weight-complex="bold"/>
    </style:style>
    <style:style style:name="P42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bold" officeooo:rsid="004a7fda" officeooo:paragraph-rsid="004a7fda" style:font-weight-asian="bold" style:font-weight-complex="bold"/>
    </style:style>
    <style:style style:name="P43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size="15pt" fo:font-weight="bold" officeooo:rsid="00138a86" officeooo:paragraph-rsid="00441521" style:font-size-asian="15pt" style:font-weight-asian="bold" style:font-size-complex="15pt" style:font-weight-complex="bold"/>
    </style:style>
    <style:style style:name="P44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size="15pt" fo:font-weight="bold" officeooo:rsid="00138a86" officeooo:paragraph-rsid="004cc390" style:font-size-asian="15pt" style:font-weight-asian="bold" style:font-size-complex="15pt" style:font-weight-complex="bold"/>
    </style:style>
    <style:style style:name="P45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size="15pt" fo:font-weight="bold" officeooo:rsid="00138a86" officeooo:paragraph-rsid="00138a86" style:font-size-asian="15pt" style:font-weight-asian="bold" style:font-size-complex="15pt" style:font-weight-complex="bold"/>
    </style:style>
    <style:style style:name="P46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size="15pt" fo:font-weight="bold" officeooo:rsid="00138a86" officeooo:paragraph-rsid="0030784d" style:font-size-asian="15pt" style:font-weight-asian="bold" style:font-size-complex="15pt" style:font-weight-complex="bold"/>
    </style:style>
    <style:style style:name="P47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size="15pt" fo:font-weight="bold" officeooo:rsid="00138a86" officeooo:paragraph-rsid="003fc574" style:font-size-asian="15pt" style:font-weight-asian="bold" style:font-size-complex="15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17.013cm" style:type="right"/>
        </style:tab-stops>
      </style:paragraph-properties>
      <style:text-properties style:font-name="Noto Mono" fo:font-style="normal" fo:font-weight="normal" officeooo:rsid="0018ddd3" officeooo:paragraph-rsid="002856ef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7.013cm" style:type="right"/>
        </style:tab-stops>
      </style:paragraph-properties>
      <style:text-properties style:font-name="Noto Mono" officeooo:paragraph-rsid="0056229d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7.013cm" style:type="right"/>
        </style:tab-stops>
      </style:paragraph-properties>
      <style:text-properties style:font-name="Noto Mono" officeooo:paragraph-rsid="0030696d"/>
    </style:style>
    <style:style style:name="P51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17.013cm" style:type="right"/>
        </style:tab-stops>
      </style:paragraph-properties>
      <style:text-properties officeooo:paragraph-rsid="00531506"/>
    </style:style>
    <style:style style:name="P52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17.013cm" style:type="right"/>
        </style:tab-stops>
      </style:paragraph-properties>
      <style:text-properties officeooo:paragraph-rsid="003fc574"/>
    </style:style>
    <style:style style:name="P53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17.013cm" style:type="right"/>
        </style:tab-stops>
      </style:paragraph-properties>
      <style:text-properties officeooo:rsid="003fc574" officeooo:paragraph-rsid="003fc574"/>
    </style:style>
    <style:style style:name="P54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17.013cm" style:type="right"/>
        </style:tab-stops>
      </style:paragraph-properties>
      <style:text-properties style:font-name="Noto Mono" officeooo:rsid="000dfcad" officeooo:paragraph-rsid="000dc81b"/>
    </style:style>
    <style:style style:name="P55" style:family="paragraph" style:parent-style-name="Standard" style:list-style-name="L1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size="12pt" fo:font-weight="normal" officeooo:rsid="003f1bec" officeooo:paragraph-rsid="003f1bec" style:font-size-asian="12pt" style:font-weight-asian="normal" style:font-size-complex="12pt" style:font-weight-complex="normal"/>
    </style:style>
    <style:style style:name="P56" style:family="paragraph" style:parent-style-name="Standard" style:list-style-name="L1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size="12pt" fo:font-weight="normal" officeooo:rsid="000dc81b" officeooo:paragraph-rsid="000dc81b" style:font-size-asian="12pt" style:font-weight-asian="normal" style:font-size-complex="12pt" style:font-weight-complex="normal"/>
    </style:style>
    <style:style style:name="P57" style:family="paragraph" style:parent-style-name="Standard" style:list-style-name="L2">
      <loext:graphic-properties draw:fill="none"/>
      <style:paragraph-properties fo:line-height="100%" fo:text-align="start" style:justify-single-word="false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4f6272" officeooo:paragraph-rsid="004f6272" style:font-weight-asian="normal" style:font-weight-complex="normal"/>
    </style:style>
    <style:style style:name="P58" style:family="paragraph" style:parent-style-name="Standard" style:list-style-name="L2">
      <loext:graphic-properties draw:fill="none"/>
      <style:paragraph-properties fo:line-height="100%" fo:text-align="start" style:justify-single-word="false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4facc0" officeooo:paragraph-rsid="004facc0" style:font-weight-asian="normal" style:font-weight-complex="normal"/>
    </style:style>
    <style:style style:name="P59" style:family="paragraph" style:parent-style-name="Standard" style:list-style-name="L2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34f8ed" officeooo:paragraph-rsid="0034f8ed" style:font-weight-asian="normal" style:font-weight-complex="normal"/>
    </style:style>
    <style:style style:name="P60" style:family="paragraph" style:parent-style-name="Standard" style:list-style-name="L2">
      <loext:graphic-properties draw:fill="none"/>
      <style:paragraph-properties fo:line-height="100%" fo:background-color="transparent">
        <style:tab-stops>
          <style:tab-stop style:position="3.731cm"/>
        </style:tab-stops>
      </style:paragraph-properties>
      <style:text-properties style:font-name="Noto Mono" fo:font-weight="normal" officeooo:rsid="004723a7" officeooo:paragraph-rsid="004723a7" style:font-weight-asian="normal" style:font-weight-complex="normal"/>
    </style:style>
    <style:style style:name="P61" style:family="paragraph" style:parent-style-name="Standard" style:list-style-name="L2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116920" officeooo:paragraph-rsid="00116920" style:font-weight-asian="normal" style:font-weight-complex="normal"/>
    </style:style>
    <style:style style:name="P62" style:family="paragraph" style:parent-style-name="Standard" style:list-style-name="L3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1be7cd" officeooo:paragraph-rsid="00660ffc" style:font-weight-asian="normal" style:font-weight-complex="normal"/>
    </style:style>
    <style:style style:name="P63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1be7cd" officeooo:paragraph-rsid="00660ffc" style:font-weight-asian="normal" style:font-weight-complex="normal"/>
    </style:style>
    <style:style style:name="P64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1be7cd" officeooo:paragraph-rsid="006e6c1a" style:font-weight-asian="normal" style:font-weight-complex="normal"/>
    </style:style>
    <style:style style:name="P65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212cb9" officeooo:paragraph-rsid="006e6c1a" style:font-weight-asian="normal" style:font-weight-complex="normal"/>
    </style:style>
    <style:style style:name="P66" style:family="paragraph" style:parent-style-name="Standard" style:list-style-name="L3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531506" officeooo:paragraph-rsid="00660ffc" style:font-weight-asian="normal" style:font-weight-complex="normal"/>
    </style:style>
    <style:style style:name="P67" style:family="paragraph" style:parent-style-name="Standard">
      <loext:graphic-properties draw:fill="none"/>
      <style:paragraph-properties fo:line-height="100%" fo:break-before="page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531506" officeooo:paragraph-rsid="00660ffc" style:font-weight-asian="normal" style:font-weight-complex="normal"/>
    </style:style>
    <style:style style:name="P68" style:family="paragraph" style:parent-style-name="Standard" style:list-style-name="L3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65ecec" officeooo:paragraph-rsid="00660ffc" style:font-weight-asian="normal" style:font-weight-complex="normal"/>
    </style:style>
    <style:style style:name="P69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1f82dd" officeooo:paragraph-rsid="0066c41b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660ffc" officeooo:paragraph-rsid="00660ffc" style:font-weight-asian="normal" style:font-weight-complex="normal"/>
    </style:style>
    <style:style style:name="P71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660ffc" officeooo:paragraph-rsid="00660ffc" style:font-weight-asian="normal" style:font-weight-complex="normal"/>
    </style:style>
    <style:style style:name="P72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66c41b" officeooo:paragraph-rsid="0066c41b" style:font-weight-asian="normal" style:font-weight-complex="normal"/>
    </style:style>
    <style:style style:name="P73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7310fb" officeooo:paragraph-rsid="007310fb" style:font-weight-asian="normal" style:font-weight-complex="normal"/>
    </style:style>
    <style:style style:name="P74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normal" officeooo:rsid="004c1b19" officeooo:paragraph-rsid="004c1b19" style:font-weight-asian="normal" style:font-weight-complex="normal"/>
    </style:style>
    <style:style style:name="P75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bold" officeooo:rsid="00441521" officeooo:paragraph-rsid="00441521" style:font-weight-asian="bold" style:font-weight-complex="bold"/>
    </style:style>
    <style:style style:name="P76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bold" officeooo:rsid="00138a86" officeooo:paragraph-rsid="00441521" style:font-weight-asian="bold" style:font-weight-complex="bold"/>
    </style:style>
    <style:style style:name="P77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bold" officeooo:rsid="00138a86" officeooo:paragraph-rsid="004cc390" style:font-weight-asian="bold" style:font-weight-complex="bold"/>
    </style:style>
    <style:style style:name="P78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bold" officeooo:rsid="00138a86" officeooo:paragraph-rsid="0048cdb9" style:font-weight-asian="bold" style:font-weight-complex="bold"/>
    </style:style>
    <style:style style:name="P79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bold" officeooo:rsid="00138a86" officeooo:paragraph-rsid="00138a86" style:font-weight-asian="bold" style:font-weight-complex="bold"/>
    </style:style>
    <style:style style:name="P80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bold" officeooo:rsid="00138a86" officeooo:paragraph-rsid="00317f9b" style:font-weight-asian="bold" style:font-weight-complex="bold"/>
    </style:style>
    <style:style style:name="P81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17.013cm" style:type="right"/>
        </style:tab-stops>
      </style:paragraph-properties>
      <style:text-properties style:font-name="Noto Mono" fo:font-weight="bold" officeooo:rsid="00116920" officeooo:paragraph-rsid="00660ffc" style:font-weight-asian="bold" style:font-weight-complex="bold"/>
    </style:style>
    <style:style style:name="P82" style:family="paragraph" style:parent-style-name="Standard">
      <loext:graphic-properties draw:fill="none"/>
      <style:paragraph-properties fo:line-height="100%" fo:break-before="page" fo:background-color="transparent">
        <style:tab-stops>
          <style:tab-stop style:position="17.013cm" style:type="right"/>
        </style:tab-stops>
      </style:paragraph-properties>
      <style:text-properties style:font-name="Noto Mono" fo:font-weight="bold" officeooo:rsid="000dc81b" officeooo:paragraph-rsid="000dc81b" style:font-weight-asian="bold" style:font-weight-complex="bold"/>
    </style:style>
    <style:style style:name="P83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weight="bold" officeooo:rsid="004a7fda" officeooo:paragraph-rsid="004a7fda" style:font-weight-asian="bold" style:font-weight-complex="bold"/>
    </style:style>
    <style:style style:name="P84" style:family="paragraph" style:parent-style-name="Standard" style:list-style-name="L3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style="normal" fo:font-weight="normal" officeooo:rsid="001be7cd" officeooo:paragraph-rsid="00660ffc" style:font-style-asian="normal" style:font-weight-asian="normal" style:font-style-complex="normal" style:font-weight-complex="normal"/>
    </style:style>
    <style:style style:name="P85" style:family="paragraph" style:parent-style-name="Standard" style:list-style-name="L3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style="normal" fo:font-weight="normal" officeooo:rsid="001be7cd" officeooo:paragraph-rsid="00743e42" style:font-style-asian="normal" style:font-weight-asian="normal" style:font-style-complex="normal" style:font-weight-complex="normal"/>
    </style:style>
    <style:style style:name="P86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size="15pt" fo:font-weight="bold" officeooo:rsid="00138a86" officeooo:paragraph-rsid="0018ddd3" style:font-size-asian="15pt" style:font-weight-asian="bold" style:font-size-complex="15pt" style:font-weight-complex="bold"/>
    </style:style>
    <style:style style:name="P87" style:family="paragraph" style:parent-style-name="Standard">
      <loext:graphic-properties draw:fill="none"/>
      <style:paragraph-properties fo:line-height="100%" fo:background-color="transparent">
        <style:tab-stops>
          <style:tab-stop style:position="17.013cm" style:type="right"/>
        </style:tab-stops>
      </style:paragraph-properties>
      <style:text-properties style:font-name="Noto Mono" fo:font-size="15pt" fo:font-weight="bold" officeooo:rsid="00138a86" officeooo:paragraph-rsid="00660ffc" style:font-size-asian="15pt" style:font-weight-asian="bold" style:font-size-complex="15pt" style:font-weight-complex="bold"/>
    </style:style>
    <style:style style:name="P88" style:family="paragraph" style:parent-style-name="Standard">
      <loext:graphic-properties draw:fill="none"/>
      <style:paragraph-properties fo:line-height="100%" fo:break-before="page" fo:background-color="transparent">
        <style:tab-stops>
          <style:tab-stop style:position="17.013cm" style:type="right"/>
        </style:tab-stops>
      </style:paragraph-properties>
      <style:text-properties style:font-name="Noto Mono" fo:font-size="15pt" fo:font-weight="normal" officeooo:rsid="007310fb" officeooo:paragraph-rsid="007310fb" style:font-size-asian="15pt" style:font-weight-asian="normal" style:font-size-complex="15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17.013cm" style:type="right"/>
        </style:tab-stops>
      </style:paragraph-properties>
      <style:text-properties officeooo:paragraph-rsid="003fc574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3f1bec" style:font-size-asian="20pt" style:font-size-complex="20pt"/>
    </style:style>
    <style:style style:name="T4" style:family="text">
      <style:text-properties fo:font-size="20pt" officeooo:rsid="000ea899" style:font-size-asian="20pt" style:font-size-complex="20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0dc81b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374fef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5d08e9" style:font-size-asian="12pt" style:font-weight-asian="bold" style:font-size-complex="12pt" style:font-weight-complex="bold"/>
    </style:style>
    <style:style style:name="T9" style:family="text">
      <style:text-properties fo:font-size="12pt" officeooo:rsid="0048cdb9" style:font-size-asian="12pt" style:font-size-complex="12pt"/>
    </style:style>
    <style:style style:name="T10" style:family="text">
      <style:text-properties officeooo:rsid="001866fa"/>
    </style:style>
    <style:style style:name="T11" style:family="text">
      <style:text-properties officeooo:rsid="003f1bec"/>
    </style:style>
    <style:style style:name="T12" style:family="text">
      <style:text-properties officeooo:rsid="0034f8e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598448" style:font-weight-asian="normal" style:font-weight-complex="normal"/>
    </style:style>
    <style:style style:name="T15" style:family="text">
      <style:text-properties fo:font-weight="normal" officeooo:rsid="003bdba2" style:font-weight-asian="normal" style:font-weight-complex="normal"/>
    </style:style>
    <style:style style:name="T16" style:family="text">
      <style:text-properties fo:font-weight="normal" officeooo:rsid="0059729f" style:font-weight-asian="normal" style:font-weight-complex="normal"/>
    </style:style>
    <style:style style:name="T17" style:family="text">
      <style:text-properties fo:font-weight="normal" officeooo:rsid="00116920" style:font-weight-asian="normal" style:font-weight-complex="normal"/>
    </style:style>
    <style:style style:name="T18" style:family="text">
      <style:text-properties fo:font-weight="normal" officeooo:rsid="00581a50" style:font-weight-asian="normal" style:font-weight-complex="normal"/>
    </style:style>
    <style:style style:name="T19" style:family="text">
      <style:text-properties fo:font-weight="normal" officeooo:rsid="0030696d" style:font-weight-asian="normal" style:font-weight-complex="normal"/>
    </style:style>
    <style:style style:name="T20" style:family="text">
      <style:text-properties fo:font-weight="normal" officeooo:rsid="002ef9ab" style:font-weight-asian="normal" style:font-weight-complex="normal"/>
    </style:style>
    <style:style style:name="T21" style:family="text">
      <style:text-properties fo:font-weight="normal" officeooo:rsid="003fc574" style:font-weight-asian="normal" style:font-weight-complex="normal"/>
    </style:style>
    <style:style style:name="T22" style:family="text">
      <style:text-properties officeooo:rsid="004facc0"/>
    </style:style>
    <style:style style:name="T23" style:family="text">
      <style:text-properties officeooo:rsid="004cc390"/>
    </style:style>
    <style:style style:name="T24" style:family="text">
      <style:text-properties officeooo:rsid="00138a86"/>
    </style:style>
    <style:style style:name="T25" style:family="text">
      <style:text-properties officeooo:rsid="00431537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b4eb4" style:font-weight-asian="bold" style:font-weight-complex="bold"/>
    </style:style>
    <style:style style:name="T28" style:family="text">
      <style:text-properties fo:font-weight="bold" officeooo:rsid="0034f8ed" style:font-weight-asian="bold" style:font-weight-complex="bold"/>
    </style:style>
    <style:style style:name="T29" style:family="text">
      <style:text-properties fo:font-weight="bold" officeooo:rsid="00246d13" style:font-weight-asian="bold" style:font-weight-complex="bold"/>
    </style:style>
    <style:style style:name="T30" style:family="text">
      <style:text-properties fo:font-weight="bold" officeooo:rsid="00298606" style:font-weight-asian="bold" style:font-weight-complex="bold"/>
    </style:style>
    <style:style style:name="T31" style:family="text">
      <style:text-properties fo:font-weight="bold" officeooo:rsid="0030784d" style:font-weight-asian="bold" style:font-weight-complex="bold"/>
    </style:style>
    <style:style style:name="T32" style:family="text">
      <style:text-properties fo:font-weight="bold" officeooo:rsid="002ef9ab" style:font-weight-asian="bold" style:font-weight-complex="bold"/>
    </style:style>
    <style:style style:name="T33" style:family="text">
      <style:text-properties fo:font-weight="bold" officeooo:rsid="0030696d" style:font-weight-asian="bold" style:font-weight-complex="bold"/>
    </style:style>
    <style:style style:name="T34" style:family="text">
      <style:text-properties fo:font-weight="bold" officeooo:rsid="00246875" style:font-weight-asian="bold" style:font-weight-complex="bold"/>
    </style:style>
    <style:style style:name="T35" style:family="text">
      <style:text-properties fo:font-weight="bold" officeooo:rsid="00441521" style:font-weight-asian="bold" style:font-weight-complex="bold"/>
    </style:style>
    <style:style style:name="T36" style:family="text">
      <style:text-properties fo:font-weight="bold" officeooo:rsid="0048cdb9" style:font-weight-asian="bold" style:font-weight-complex="bold"/>
    </style:style>
    <style:style style:name="T37" style:family="text">
      <style:text-properties officeooo:rsid="0048cdb9"/>
    </style:style>
    <style:style style:name="T38" style:family="text">
      <style:text-properties officeooo:rsid="00441521"/>
    </style:style>
    <style:style style:name="T39" style:family="text">
      <style:text-properties officeooo:rsid="004723a7"/>
    </style:style>
    <style:style style:name="T40" style:family="text">
      <style:text-properties officeooo:rsid="00153230"/>
    </style:style>
    <style:style style:name="T41" style:family="text">
      <style:text-properties officeooo:rsid="0030784d"/>
    </style:style>
    <style:style style:name="T42" style:family="text">
      <style:text-properties officeooo:rsid="001f82dd"/>
    </style:style>
    <style:style style:name="T43" style:family="text">
      <style:text-properties officeooo:rsid="001737eb"/>
    </style:style>
    <style:style style:name="T44" style:family="text">
      <style:text-properties officeooo:rsid="0018ddd3"/>
    </style:style>
    <style:style style:name="T45" style:family="text">
      <style:text-properties officeooo:rsid="00298606"/>
    </style:style>
    <style:style style:name="T46" style:family="text">
      <style:text-properties officeooo:rsid="00212cb9"/>
    </style:style>
    <style:style style:name="T47" style:family="text">
      <style:text-properties officeooo:rsid="001d9ce5"/>
    </style:style>
    <style:style style:name="T48" style:family="text">
      <style:text-properties officeooo:rsid="001be7cd"/>
    </style:style>
    <style:style style:name="T49" style:family="text">
      <style:text-properties officeooo:rsid="003fc574"/>
    </style:style>
    <style:style style:name="T50" style:family="text">
      <style:text-properties officeooo:rsid="00246875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0246875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0298606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02856ef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0263eab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660ffc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6e6c1a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2ef9ab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531506" style:font-style-asian="italic" style:font-weight-asian="bold" style:font-style-complex="italic" style:font-weight-complex="bold"/>
    </style:style>
    <style:style style:name="T60" style:family="text">
      <style:text-properties officeooo:rsid="00246d13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02856ef" style:font-style-asian="normal" style:font-style-complex="normal"/>
    </style:style>
    <style:style style:name="T63" style:family="text">
      <style:text-properties fo:font-style="normal" officeooo:rsid="00263eab" style:font-style-asian="normal" style:font-style-complex="normal"/>
    </style:style>
    <style:style style:name="T64" style:family="text">
      <style:text-properties fo:font-style="normal" officeooo:rsid="002ef9ab" style:font-style-asian="normal" style:font-style-complex="normal"/>
    </style:style>
    <style:style style:name="T65" style:family="text">
      <style:text-properties fo:font-style="normal" officeooo:rsid="00246875" style:font-style-asian="normal" style:font-style-complex="normal"/>
    </style:style>
    <style:style style:name="T66" style:family="text">
      <style:text-properties fo:font-style="normal" officeooo:rsid="006e6c1a" style:font-style-asian="normal" style:font-style-complex="normal"/>
    </style:style>
    <style:style style:name="T67" style:family="text">
      <style:text-properties fo:font-style="normal" officeooo:rsid="006f2721" style:font-style-asian="normal" style:font-style-complex="normal"/>
    </style:style>
    <style:style style:name="T68" style:family="text">
      <style:text-properties fo:font-style="normal" officeooo:rsid="00531506" style:font-style-asian="normal" style:font-style-complex="normal"/>
    </style:style>
    <style:style style:name="T69" style:family="text">
      <style:text-properties fo:font-style="normal" fo:font-weight="normal" officeooo:rsid="0056229d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2ef9ab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30696d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611b4b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531506" style:font-style-asian="normal" style:font-weight-asian="bold" style:font-style-complex="normal" style:font-weight-complex="bold"/>
    </style:style>
    <style:style style:name="T75" style:family="text">
      <style:text-properties style:font-name="Noto Mono" fo:font-weight="normal" style:font-weight-asian="normal" style:font-weight-complex="normal"/>
    </style:style>
    <style:style style:name="T76" style:family="text">
      <style:text-properties style:font-name="Noto Mono" fo:font-weight="normal" officeooo:rsid="00317f9b" style:font-weight-asian="normal" style:font-weight-complex="normal"/>
    </style:style>
    <style:style style:name="T77" style:family="text">
      <style:text-properties style:font-name="Noto Mono" fo:font-weight="normal" officeooo:rsid="00531506" style:font-weight-asian="normal" style:font-weight-complex="normal"/>
    </style:style>
    <style:style style:name="T78" style:family="text">
      <style:text-properties style:font-name="Noto Mono" fo:font-weight="normal" officeooo:rsid="003fc574" style:font-weight-asian="normal" style:font-weight-complex="normal"/>
    </style:style>
    <style:style style:name="T79" style:family="text">
      <style:text-properties style:font-name="Noto Mono" fo:font-weight="normal" officeooo:rsid="0030784d" style:font-weight-asian="normal" style:font-weight-complex="normal"/>
    </style:style>
    <style:style style:name="T80" style:family="text">
      <style:text-properties style:font-name="Noto Mono" fo:font-weight="normal" officeooo:rsid="0065ecec" style:font-weight-asian="normal" style:font-weight-complex="normal"/>
    </style:style>
    <style:style style:name="T81" style:family="text">
      <style:text-properties style:font-name="Noto Mono" fo:font-style="italic" fo:font-weight="bold" style:font-style-asian="italic" style:font-weight-asian="bold" style:font-style-complex="italic" style:font-weight-complex="bold"/>
    </style:style>
    <style:style style:name="T82" style:family="text">
      <style:text-properties style:font-name="Noto Mono" fo:font-style="italic" fo:font-weight="bold" officeooo:rsid="00531506" style:font-style-asian="italic" style:font-weight-asian="bold" style:font-style-complex="italic" style:font-weight-complex="bold"/>
    </style:style>
    <style:style style:name="T83" style:family="text">
      <style:text-properties style:font-name="Noto Mono" fo:font-weight="bold" style:font-weight-asian="bold" style:font-weight-complex="bold"/>
    </style:style>
    <style:style style:name="T84" style:family="text">
      <style:text-properties style:font-name="Noto Mono" fo:font-weight="bold" officeooo:rsid="00717cbe" style:font-weight-asian="bold" style:font-weight-complex="bold"/>
    </style:style>
    <style:style style:name="T85" style:family="text">
      <style:text-properties officeooo:rsid="002ef9ab"/>
    </style:style>
    <style:style style:name="T86" style:family="text">
      <style:text-properties officeooo:rsid="0056229d"/>
    </style:style>
    <style:style style:name="T87" style:family="text">
      <style:text-properties officeooo:rsid="005e0ff4"/>
    </style:style>
    <style:style style:name="T88" style:family="text">
      <style:text-properties officeooo:rsid="00611b4b"/>
    </style:style>
    <style:style style:name="T89" style:family="text">
      <style:text-properties officeooo:rsid="0061cdc1"/>
    </style:style>
    <style:style style:name="T90" style:family="text">
      <style:text-properties officeooo:rsid="00660ffc"/>
    </style:style>
    <style:style style:name="T91" style:family="text">
      <style:text-properties fo:font-size="15pt" style:font-size-asian="15pt" style:font-size-complex="15pt"/>
    </style:style>
    <style:style style:name="T92" style:family="text">
      <style:text-properties fo:font-size="15pt" officeooo:rsid="003f1bec" style:font-size-asian="15pt" style:font-size-complex="15pt"/>
    </style:style>
    <style:style style:name="T93" style:family="text">
      <style:text-properties fo:font-size="15pt" officeooo:rsid="0018ddd3" style:font-size-asian="15pt" style:font-size-complex="15pt"/>
    </style:style>
    <style:style style:name="T94" style:family="text">
      <style:text-properties fo:font-size="15pt" officeooo:rsid="00660ffc" style:font-size-asian="15pt" style:font-size-complex="15pt"/>
    </style:style>
    <style:style style:name="T95" style:family="text">
      <style:text-properties fo:font-size="15pt" officeooo:rsid="006e6c1a" style:font-size-asian="15pt" style:font-size-complex="15pt"/>
    </style:style>
    <style:style style:name="T96" style:family="text">
      <style:text-properties fo:font-size="15pt" officeooo:rsid="00441521" style:font-size-asian="15pt" style:font-size-complex="15pt"/>
    </style:style>
    <style:style style:name="T97" style:family="text">
      <style:text-properties fo:font-size="15pt" officeooo:rsid="0048cdb9" style:font-size-asian="15pt" style:font-size-complex="15pt"/>
    </style:style>
    <style:style style:name="T98" style:family="text">
      <style:text-properties fo:font-size="15pt" fo:font-weight="bold" officeooo:rsid="00441521" style:font-size-asian="15pt" style:font-weight-asian="bold" style:font-size-complex="15pt" style:font-weight-complex="bold"/>
    </style:style>
    <style:style style:name="T99" style:family="text">
      <style:text-properties fo:font-size="15pt" fo:font-weight="bold" officeooo:rsid="0048cdb9" style:font-size-asian="15pt" style:font-weight-asian="bold" style:font-size-complex="15pt" style:font-weight-complex="bold"/>
    </style:style>
    <style:style style:name="T100" style:family="text">
      <style:text-properties officeooo:rsid="0066c41b"/>
    </style:style>
    <style:style style:name="T101" style:family="text">
      <style:text-properties officeooo:rsid="006a0447"/>
    </style:style>
    <style:style style:name="T102" style:family="text">
      <style:text-properties officeooo:rsid="006e6c1a"/>
    </style:style>
    <style:style style:name="T103" style:family="text">
      <style:text-properties officeooo:rsid="006f2721"/>
    </style:style>
    <style:style style:name="T104" style:family="text">
      <style:text-properties officeooo:rsid="00531506"/>
    </style:style>
    <style:style style:name="T105" style:family="text">
      <style:text-properties officeooo:rsid="00743e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5-patrový výtah</text:span><text:span text:style-name="T5"><text:tab/></text:span><text:span text:style-name="T6">15.1.2025 </text:span><text:span text:style-name="T7">(update: 1</text:span><text:span text:style-name="T8">7</text:span><text:span text:style-name="T7">.1)</text:span></text:p>
      <text:p text:style-name="P1"/>
      <text:p text:style-name="P2">Přehled informací:</text:p>
      <text:list text:style-name="L1">
        <text:list-item>
          <text:p text:style-name="P55">TC(představa/plán/využití)</text:p>
        </text:list-item>
        <text:list-item>
          <text:p text:style-name="P56">Konstrukce</text:p>
        </text:list-item>
        <text:list-item>
          <text:p text:style-name="P56"><text:span text:style-name="T10">O</text:span>vládacích prvků</text:p>
        </text:list-item>
        <text:list-item>
          <text:p text:style-name="P56">Ovládací program</text:p>
        </text:list-item>
      </text:list>
      <text:p text:style-name="P3"/>
      <text:p text:style-name="P4"><text:span text:style-name="T11">1</text:span>. -<text:span text:style-name="T11">TC</text:span>-:</text:p>
      <text:p text:style-name="P6"/>
      <text:p text:style-name="P6">TC</text:p>
      <text:p text:style-name="P3"/>
      <text:p text:style-name="P5"><text:span text:style-name="T11">2</text:span>. Konstrukce:</text:p>
      <text:p text:style-name="P7"/>
      <text:p text:style-name="P37"><text:span text:style-name="T12">Použité součástky</text:span>:<text:tab/><text:span text:style-name="T14">Nákres </text:span><text:span text:style-name="T15">(</text:span><text:span text:style-name="T16">1</text:span><text:span text:style-name="T14">6</text:span><text:span text:style-name="T16">.1.25 </text:span><text:span text:style-name="T15">nedokončené)</text:span><draw:frame draw:style-name="fr1" draw:name="Image2" text:anchor-type="char" svg:x="9.109cm" svg:y="0.51cm" svg:width="7.779cm" svg:height="17.727cm" draw:z-index="0"><draw:image xlink:href="Pictures/10000001000001260000029E5657BAAEC694E066.png" xlink:type="simple" xlink:show="embed" xlink:actuate="onLoad" draw:mime-type="image/png"/></draw:frame></text:p>
      <text:list xml:id="list3859755988" text:style-name="L2">
        <text:list-item>
          <text:p text:style-name="P57">ND 103 sada<text:tab/>x1</text:p>
        </text:list-item>
        <text:list-item>
          <text:p text:style-name="P57">Pásek 6 d.<text:tab/>x4</text:p>
        </text:list-item>
        <text:list-item>
          <text:p text:style-name="P57">Pásek 15 d.<text:tab/>14x</text:p>
        </text:list-item>
        <text:list-item>
          <text:p text:style-name="P57">Pásek 25 d.<text:tab/>6x</text:p>
        </text:list-item>
        <text:list-item>
          <text:p text:style-name="P57">Pásek tvarovaný 15 d.<text:tab/>6x</text:p>
        </text:list-item>
        <text:list-item>
          <text:p text:style-name="P57">Pásek tvarovaný 25 d.<text:tab/>7x</text:p>
        </text:list-item>
        <text:list-item>
          <text:p text:style-name="P57">Pásek trojitý 3x10 d.<text:tab/>5x</text:p>
        </text:list-item>
        <text:list-item>
          <text:p text:style-name="P57">Úhelníková deska 50x100mm<text:tab/>4x</text:p>
        </text:list-item>
        <text:list-item>
          <text:p text:style-name="P57">Deska ocelová 50x100mm<text:tab/>6x</text:p>
        </text:list-item>
        <text:list-item>
          <text:p text:style-name="P57">Kolo kladkové<text:tab/>2x</text:p>
        </text:list-item>
        <text:list-item>
          <text:p text:style-name="P57">Hřídel 150mm<text:tab/>2x</text:p>
        </text:list-item>
        <text:list-item>
          <text:p text:style-name="P57">Stavěcí kroužek s o. 4Mm<text:tab/>8<text:span text:style-name="T22">x</text:span></text:p>
        </text:list-item>
        <text:list-item>
          <text:p text:style-name="P58">Šroubky _N_mm<text:tab/>_N_x</text:p>
        </text:list-item>
        <text:list-item>
          <text:p text:style-name="P58">Šroubky _N_mm<text:tab/>_N_x</text:p>
        </text:list-item>
        <text:list-item>
          <text:p text:style-name="P58">Matice<text:tab/>_N_x</text:p>
        </text:list-item>
      </text:list>
      <text:p text:style-name="P7"/>
      <text:p text:style-name="P7">TC &lt;&lt;<text:span text:style-name="T23">inventor sketch&gt;&gt;</text:span></text:p>
      <text:p text:style-name="P8"/>
      <text:p text:style-name="P10">TC</text:p>
      <text:p text:style-name="P10"/>
      <text:p text:style-name="P9"/>
      <text:p text:style-name="P5"><text:span text:style-name="T11">3</text:span>. <text:span text:style-name="T24">Ovládací prvky</text:span>:</text:p>
      <text:p text:style-name="P7"/>
      <text:p text:style-name="P11">Pro automatické ovládání a pohyb výtahu <text:span text:style-name="T25">jsou za</text:span>potřeb<text:span text:style-name="T25">í</text:span> <text:span text:style-name="T25">jisté<text:line-break/>elektronické součástky.</text:span></text:p>
      <text:p text:style-name="P12"/>
      <text:p text:style-name="P38"><text:span text:style-name="T12">Použité součástky</text:span>:<text:tab/><text:span text:style-name="T15">Schéma zapojení</text:span></text:p>
      <text:list xml:id="list131002745850821" text:continue-numbering="true" text:style-name="L2">
        <text:list-item>
          <text:p text:style-name="P59">LOGO! 8.<text:span text:style-name="T89">4</text:span> PLC<draw:frame draw:style-name="fr1" draw:name="Image1" text:anchor-type="char" svg:x="6.465cm" svg:y="0.31cm" svg:width="11.903cm" svg:height="11.792cm" draw:z-index="1"><draw:image xlink:href="Pictures/10000000000003C1000003B832F53A72F78E466B.png" xlink:type="simple" xlink:show="embed" xlink:actuate="onLoad" draw:mime-type="image/png"/></draw:frame></text:p>
        </text:list-item>
        <text:list-item>
          <text:p text:style-name="P59">Relé (x2)</text:p>
        </text:list-item>
        <text:list-item>
          <text:p text:style-name="P59">12V DC Motor</text:p>
        </text:list-item>
        <text:list-item>
          <text:p text:style-name="P59">Indukční senzor (5x)</text:p>
        </text:list-item>
        <text:list-item>
          <text:p text:style-name="P59">Tlačítka (5x)</text:p>
        </text:list-item>
        <text:list-item>
          <text:p text:style-name="P59">Indikační LED (5x)</text:p>
        </text:list-item>
      </text:list>
      <text:p text:style-name="P16"/>
      <text:p text:style-name="P17"><text:span text:style-name="T26">Poz</text:span><text:span text:style-name="T27">n</text:span><text:span text:style-name="T26">ámka:</text:span> <text:span text:style-name="T37">Pro zvětšení počtu pater jsou potřeba pouze další senzory, tlačítka a LED.</text:span></text:p>
      <text:p text:style-name="P16"/>
      <text:p text:style-name="P43"><text:span text:style-name="T38">3</text:span>-1. <text:span text:style-name="T38">PLC</text:span></text:p>
      <text:p text:style-name="P75"/>
      <text:p text:style-name="P25">Pohyb výtahu je ovládán<text:line-break/>pomocí <text:span text:style-name="T72">LOGO! 8.</text:span><text:span text:style-name="T73">4</text:span><text:span text:style-name="T88">.</text:span></text:p>
      <text:p text:style-name="P25"/>
      <text:p text:style-name="P39"><text:span text:style-name="T39">IO</text:span>:</text:p>
      <text:list xml:id="list131003250773673" text:continue-numbering="true" text:style-name="L2">
        <text:list-item>
          <text:p text:style-name="P60">Tlačítka (5x)<text:tab/>[in]</text:p>
        </text:list-item>
        <text:list-item>
          <text:p text:style-name="P60">Senzory (5x)<text:tab/>[in]</text:p>
        </text:list-item>
        <text:list-item>
          <text:p text:style-name="P60">Motor (2x)<text:tab/>[out]</text:p>
        </text:list-item>
        <text:list-item>
          <text:p text:style-name="P60">LED (5x)<text:tab/>[out]</text:p>
        </text:list-item>
      </text:list>
      <text:p text:style-name="P26"/>
      <text:p text:style-name="P43"><text:span text:style-name="T38">3</text:span>-<text:span text:style-name="T37">2</text:span>. <text:span text:style-name="T38">Ovládání motoru</text:span></text:p>
      <text:p text:style-name="P76"/>
      <text:p text:style-name="P41"><text:span text:style-name="T17">T</text:span><text:span text:style-name="T13">C</text:span></text:p>
      <text:p text:style-name="P27"/>
      <text:p text:style-name="P44"><text:span text:style-name="T38">3</text:span>-<text:span text:style-name="T37">2-</text:span><text:span text:style-name="T23">1</text:span>. <text:span text:style-name="T23">M</text:span><text:span text:style-name="T38">otor</text:span></text:p>
      <text:p text:style-name="P77"/>
      <text:p text:style-name="P28">TC -rychlost pohybu-</text:p>
      <text:p text:style-name="P27"/>
      <text:p text:style-name="P44"><text:span text:style-name="T38">3</text:span>-<text:span text:style-name="T37">2-</text:span><text:span text:style-name="T23">2</text:span>. <text:span text:style-name="T23">Relé</text:span></text:p>
      <text:p text:style-name="P77"/>
      <text:p text:style-name="P73">Pro ovládání směru motoru jsou využity 2 relé, které mění polaritu na motoru.</text:p>
      <text:p text:style-name="P73"/>
      <text:p text:style-name="P73">Aktivace relátek je závislá na <text:span text:style-name="T59">Motor-Power-Up </text:span><text:span text:style-name="T104">a </text:span><text:span text:style-name="T59">Motor-Power-Down</text:span><text:span text:style-name="T68">.</text:span></text:p>
      <text:p text:style-name="P73">Nikdy se nesmí se zapnout obě relé zároveň.</text:p>
      <text:p text:style-name="P88"><text:span text:style-name="T35">3-3. Induk</text:span><text:span text:style-name="T36">ční senzory</text:span></text:p>
      <text:p text:style-name="P78"/>
      <text:p text:style-name="P29">V každém patře je indukční senzor detekující výstupek z kabiny<text:line-break/>výtahu. Tyto senzory jsou umístěny do středu výšky výchozí polohy<text:line-break/>kabiny.</text:p>
      <text:p text:style-name="P29"/>
      <text:p text:style-name="P78"><text:span text:style-name="T96">3</text:span><text:span text:style-name="T91">-</text:span><text:span text:style-name="T97">4</text:span><text:span text:style-name="T91">. </text:span><text:span text:style-name="T97">Tlačítka a LED</text:span></text:p>
      <text:p text:style-name="P78"/>
      <text:p text:style-name="P42"><text:span text:style-name="T17">K</text:span><text:span text:style-name="T13">aždé patro má tlačítko a indikační </text:span><text:span text:style-name="T18">LED</text:span><text:span text:style-name="T13">.</text:span></text:p>
      <text:p text:style-name="P42"><text:span text:style-name="T13"/></text:p>
      <text:p text:style-name="P42"><text:span text:style-name="T17">T</text:span><text:span text:style-name="T13">lačítka vysílají pulz signálu do PLC. LED jsou napojené na výstup z PLC a indikují stav přivolání výtahu.</text:span></text:p>
      <text:p text:style-name="P71"/>
      <text:p text:style-name="P82"><text:span text:style-name="T3">4</text:span><text:span text:style-name="T2">. O</text:span><text:span text:style-name="T4">vládací program:</text:span></text:p>
      <text:p text:style-name="P18"/>
      <text:p text:style-name="P20">Výtah je ovládaný pomocí <text:span text:style-name="T26">LOGO! 8 </text:span><text:span text:style-name="T28">PLC</text:span><text:span text:style-name="T12"> programovaný v</text:span> <text:span text:style-name="T26">LOGO 8.</text:span><text:span text:style-name="T28">4</text:span><text:span text:style-name="T12">.</text:span></text:p>
      <text:p text:style-name="P21"/>
      <text:p text:style-name="P45"><text:span text:style-name="T11">4</text:span>-1. <text:span text:style-name="T40">PLC </text:span><text:span text:style-name="T41">vstupy/výstupy</text:span></text:p>
      <text:p text:style-name="P79"/>
      <text:p text:style-name="P13">Pro možnost ovládání výtahu za pomocí PLC potřebujeme znát</text:p>
      <text:p text:style-name="P14">aktivní vstupy a výstupy, které máme k dispozici.</text:p>
      <text:p text:style-name="P14"/>
      <text:p text:style-name="P40">Známé vstup:</text:p>
      <text:list xml:id="list131004078242317" text:continue-numbering="true" text:style-name="L2">
        <text:list-item>
          <text:p text:style-name="P61">Aktivní patrový sen<text:span text:style-name="T42">z</text:span>or</text:p>
        </text:list-item>
        <text:list-item>
          <text:p text:style-name="P61">Stisknuté tlačítka přiv<text:span text:style-name="T43">ol</text:span>ání výtahu</text:p>
        </text:list-item>
      </text:list>
      <text:p text:style-name="P15"/>
      <text:p text:style-name="P40">Možné výstupy:</text:p>
      <text:list xml:id="list131002936342099" text:continue-numbering="true" text:style-name="L2">
        <text:list-item>
          <text:p text:style-name="P61">Spuštění motoru (pohyb nahoru)</text:p>
        </text:list-item>
        <text:list-item>
          <text:p text:style-name="P61">Spuštění motoru (pohyb dolů)</text:p>
        </text:list-item>
        <text:list-item>
          <text:p text:style-name="P61">Indikativní led diody pat<text:span text:style-name="T101">er</text:span></text:p>
        </text:list-item>
      </text:list>
      <text:p text:style-name="P14"/>
      <text:p text:style-name="P19"><text:span text:style-name="T26">Poz</text:span><text:span text:style-name="T27">n</text:span><text:span text:style-name="T26">ámka:</text:span> Nikdy by neměli být spuštěné oba směry pohybu motoru.</text:p>
      <text:p text:style-name="P19"/>
      <text:p text:style-name="P86"><text:span text:style-name="T11">4</text:span>-<text:span text:style-name="T44">2</text:span>. <text:span text:style-name="T44">Program</text:span></text:p>
      <text:p text:style-name="P86"/>
      <text:p text:style-name="P70">Celý program výtahu se skládá z modulárních sektorů, které je možno snadno duplikovat.</text:p>
      <text:p text:style-name="P70"/>
      <text:p text:style-name="P87"><text:span text:style-name="T11">4</text:span>-<text:span text:style-name="T44">2-</text:span><text:span text:style-name="T90">1</text:span><text:span text:style-name="T49">. </text:span><text:span text:style-name="T90">Sensor-Input</text:span></text:p>
      <text:p text:style-name="P63"><text:span text:style-name="T21"/></text:p>
      <text:p text:style-name="P63"><text:span text:style-name="T49">Každ</text:span><text:span text:style-name="T90">ý sen</text:span><text:span text:style-name="T100">zor</text:span><text:span text:style-name="T49"> </text:span><text:span text:style-name="T90">má </text:span><text:span text:style-name="T56">RS-latch</text:span><text:span text:style-name="T90">, která si pamatuje poslední </text:span><text:span text:style-name="T100">pozici výtahové kabiny.</text:span></text:p>
      <text:p text:style-name="P72"><text:span text:style-name="T51">RS-latch</text:span> Sensor-Input může být <text:span text:style-name="T26">zaplá</text:span> vždy <text:span text:style-name="T26">pouze jedna</text:span>. A to ta nejaktuálnější (Aktivace senzoru vypne všechny ostatní <text:span text:style-name="T51">RS-latch</text:span>).</text:p>
      <text:p text:style-name="P69"/>
      <text:p text:style-name="P80"><text:span text:style-name="T92">4</text:span><text:span text:style-name="T91">-</text:span><text:span text:style-name="T93">2-</text:span><text:span text:style-name="T94">2</text:span><text:span text:style-name="T91">. </text:span><text:span text:style-name="T95">Patro</text:span></text:p>
      <text:p text:style-name="P63"/>
      <text:p text:style-name="P63">Každé patro je reprezentováno modulem <text:span text:style-name="T57">Patro</text:span><text:span text:style-name="T102">.</text:span></text:p>
      <text:p text:style-name="P63"/>
      <text:p text:style-name="P64">Každ<text:span text:style-name="T102">é</text:span> <text:span text:style-name="T57">Patro</text:span> má <text:span text:style-name="T46">5</text:span> vstup<text:span text:style-name="T46">ů</text:span> a <text:span text:style-name="T47">3</text:span> výstupy.</text:p>
      <text:p text:style-name="P81"><text:span text:style-name="T48">Vstupy</text:span>:</text:p>
      <text:list xml:id="list2646364392" text:style-name="L3">
        <text:list-item>
          <text:p text:style-name="P84">Elevator-Above <text:span text:style-name="T87">(implicitní)</text:span></text:p>
        </text:list-item>
        <text:list-item>
          <text:p text:style-name="P85">Elevator-Below <text:span text:style-name="T87">(implicitní)</text:span><text:span text:style-name="T80"/></text:p>
        </text:list-item>
        <text:list-item>
          <text:p text:style-name="P85">Sensor-<text:span text:style-name="T105">Input</text:span></text:p>
        </text:list-item>
        <text:list-item>
          <text:p text:style-name="P62">Button</text:p>
        </text:list-item>
        <text:list-item>
          <text:p text:style-name="P68">Auto-Mode (Auto-Button-Sequence)</text:p>
        </text:list-item>
      </text:list>
      <text:p text:style-name="P63"/>
      <text:p text:style-name="P81"><text:span text:style-name="T48">V</text:span><text:span text:style-name="T47">ý</text:span><text:span text:style-name="T48">stupy</text:span>:</text:p>
      <text:list xml:id="list131003349907964" text:continue-numbering="true" text:style-name="L3">
        <text:list-item>
          <text:p text:style-name="P66">Motor-Power-Up</text:p>
        </text:list-item>
        <text:list-item>
          <text:p text:style-name="P66">Motor-Power-Down</text:p>
        </text:list-item>
      </text:list>
      <text:p text:style-name="P67"/>
      <text:p text:style-name="P65">Každý <text:span text:style-name="T57">Patro</text:span> má na začátku <text:span text:style-name="T51">RS-latch</text:span>, která si pamatuje, jestli<text:line-break/>má výtah v daném patře zastavit. <text:span text:style-name="T50">Při zmáčknutí tlačítka se<text:line-break/></text:span><text:span text:style-name="T52">RS-latch</text:span><text:span text:style-name="T50"> sepne a </text:span><text:span text:style-name="T34">vypne se při detekci výtahu senzorem daného<text:line-break/>patra</text:span><text:span text:style-name="T50">, nebo při spuštění </text:span><text:span text:style-name="T52">E-STOP</text:span><text:span text:style-name="T50"> signálu, který vyžádá vypnutí<text:line-break/>všech </text:span><text:span text:style-name="T52">RS-latch</text:span><text:span text:style-name="T65"> </text:span><text:span text:style-name="T66">pater.</text:span></text:p>
      <text:p text:style-name="P30"/>
      <text:p text:style-name="P65"><text:span text:style-name="T60">Každý </text:span><text:span text:style-name="T57">Patro</text:span><text:span text:style-name="T60"> kontroluje stav všech senzorů </text:span><text:span text:style-name="T29">nad</text:span><text:span text:style-name="T60"> a </text:span><text:span text:style-name="T29">pod</text:span><text:span text:style-name="T60"> </text:span><text:span text:style-name="T29">sebou</text:span><text:span text:style-name="T60">.</text:span></text:p>
      <text:p text:style-name="P31">Pokud se aktivuje jakýkoliv senzor <text:span text:style-name="T26">nad</text:span> současným patrem<text:line-break/><text:span text:style-name="T45">a RS-latch je sepnutá</text:span>, tak spustíme <text:span text:style-name="T51">Elevator-Above</text:span>.</text:p>
      <text:p text:style-name="P32">Pokud se aktivuje jakýkoliv senzor <text:span text:style-name="T30">pod</text:span> současným patrem<text:line-break/><text:span text:style-name="T45">a RS-latch je sepnutá</text:span>, tak spustíme <text:span text:style-name="T51">Elevator-</text:span><text:span text:style-name="T53">Below</text:span>.</text:p>
      <text:p text:style-name="P22"/>
      <text:p text:style-name="P46"><text:span text:style-name="T11">4</text:span>-<text:span text:style-name="T44">2-</text:span><text:span text:style-name="T90">3</text:span>. <text:span text:style-name="T62">Motor-Controller</text:span></text:p>
      <text:p text:style-name="P33"/>
      <text:p text:style-name="P23"><text:span text:style-name="T54">Motor-Controller</text:span> <text:span text:style-name="T41">je spravuje </text:span><text:span text:style-name="T31">aktivaci a směr pohybu motoru</text:span><text:span text:style-name="T41">.</text:span></text:p>
      <text:p text:style-name="P51"><text:span text:style-name="T76">Pro výstup jsou použity 2 signály </text:span><text:span text:style-name="T82">Motor-Power-Up<text:line-break/></text:span><text:span text:style-name="T77">a </text:span><text:span text:style-name="T82">Motor-Power-Down</text:span><text:span text:style-name="T76"> (viz. </text:span><text:span text:style-name="T77">3-2.</text:span><text:span text:style-name="T76">).</text:span></text:p>
      <text:p text:style-name="P22"/>
      <text:p text:style-name="P49"><text:span text:style-name="T85">Pokud </text:span><text:span text:style-name="T41">se jakákoliv</text:span><text:span text:style-name="T85"> </text:span><text:span text:style-name="T32">RS-latch</text:span><text:span text:style-name="T85"> </text:span><text:span text:style-name="T103">patra</text:span><text:span text:style-name="T86"> </text:span><text:span text:style-name="T32">sepn</text:span><text:span text:style-name="T31">e</text:span><text:span text:style-name="T41">, tak </text:span><text:span text:style-name="T19">vyšleme signál pro<text:line-break/></text:span><text:span text:style-name="T31">spuštění </text:span><text:span text:style-name="T19">do </text:span><text:span text:style-name="T54">Motor-Controller</text:span><text:span text:style-name="T69">, s prodlevou 2 sekund.</text:span></text:p>
      <text:p text:style-name="P48"/>
      <text:p text:style-name="P50"><text:span text:style-name="T20">Pokud je </text:span><text:span text:style-name="T58">RS-latch</text:span><text:span text:style-name="T20"> </text:span><text:span text:style-name="T32">sepnutá</text:span><text:span text:style-name="T20"> a </text:span><text:span text:style-name="T32">senzor</text:span><text:span text:style-name="T20"> </text:span><text:span text:style-name="T19">daného patra</text:span><text:span text:style-name="T20"> je </text:span><text:span text:style-name="T32">aktivní</text:span><text:span text:style-name="T20"><text:line-break/></text:span><text:span text:style-name="T70">(aktivace senzoru vypne RS-latch, takže kontrola RS-latch<text:line-break/>je s prodlevou 1 ms), tak </text:span><text:span text:style-name="T71">vyšle</text:span><text:span text:style-name="T19">me signál pro </text:span><text:span text:style-name="T33">zastavení</text:span><text:span text:style-name="T19"> do<text:line-break/></text:span><text:span text:style-name="T54">Motor-Controller</text:span><text:span text:style-name="T20">.</text:span></text:p>
      <text:p text:style-name="P35"/>
      <text:p text:style-name="P36">Pro ovládání směru využíváme <text:span text:style-name="T55">Elevator-Above </text:span>a <text:span text:style-name="T55">Elevator-</text:span><text:span text:style-name="T53">Below</text:span><text:span text:style-name="T85">.</text:span></text:p>
      <text:p text:style-name="P36">Abychom zajistili spolehlivost výtahu, tak <text:span text:style-name="T54">Motor-Controller<text:line-break/></text:span>si uchovává současný směr ve vlastní <text:span text:style-name="T51">RS-latch</text:span>.</text:p>
      <text:p text:style-name="P36"/>
      <text:p text:style-name="P36">Tato <text:span text:style-name="T51">RS-latch</text:span> mění stav, když je <text:span text:style-name="T55">Elevator-Above</text:span><text:span text:style-name="T63"> </text:span><text:span text:style-name="T61">nebo </text:span><text:span text:style-name="T55">Elevator-</text:span><text:span text:style-name="T53">Below</text:span><text:span text:style-name="T64"> </text:span><text:span text:style-name="T61">aktivní </text:span><text:span text:style-name="T67">(0 – dolů; 1 – nahoru)</text:span><text:span text:style-name="T61">. Pokud jsou </text:span><text:span text:style-name="T55">Elevator-Above</text:span><text:span text:style-name="T63"> </text:span><text:span text:style-name="T61">a </text:span><text:span text:style-name="T55">Elevator-</text:span><text:span text:style-name="T53">Below</text:span><text:span text:style-name="T61"> aktivní</text:span><text:span text:style-name="T64">, t</text:span><text:span text:style-name="T61">ak zachováváme současný stav pohybu (první směr při přivolání výtahu).</text:span></text:p>
      <text:p text:style-name="P24"/>
      <text:p text:style-name="P47"><text:span text:style-name="T11">4</text:span>-<text:span text:style-name="T44">2-</text:span><text:span text:style-name="T90">4</text:span><text:span text:style-name="T49">. LED indikátory</text:span></text:p>
      <text:p text:style-name="P34"/>
      <text:p text:style-name="P52"><text:span text:style-name="T78">Pro lepší poznání, jestli</text:span><text:span text:style-name="T79"> </text:span><text:span text:style-name="T78">byl výtah již přivolán, má každé patro<text:line-break/>indikační LED. Tato dioda oznamuje, jestli byl výtah již přivolán.</text:span></text:p>
      <text:p text:style-name="P52"/>
      <text:p text:style-name="P53"><text:span text:style-name="T75">Aktivace diody přímo </text:span><text:span text:style-name="T83">kopíruje</text:span><text:span text:style-name="T75"> stav </text:span><text:span text:style-name="T81">RS-latch</text:span><text:span text:style-name="T75"> </text:span><text:span text:style-name="T84">patra</text:span><text:span text:style-name="T75">.</text:span></text:p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9:30:07.159127962</meta:creation-date>
    <dc:date>2025-04-23T13:09:49.063278933</dc:date>
    <meta:editing-duration>PT5H27M29S</meta:editing-duration>
    <meta:editing-cycles>83</meta:editing-cycles>
    <meta:generator>LibreOffice/7.4.7.2$Linux_X86_64 LibreOffice_project/40$Build-2</meta:generator>
    <meta:document-statistic meta:table-count="0" meta:image-count="2" meta:object-count="0" meta:page-count="5" meta:paragraph-count="102" meta:word-count="660" meta:character-count="4148" meta:non-whitespace-character-count="3629"/>
  </office:meta>
</office:document-meta>
</file>